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0b5d2"/>
    </style:style>
    <style:style style:name="P2" style:family="paragraph" style:parent-style-name="Standard">
      <style:text-properties officeooo:rsid="0020b5d2" officeooo:paragraph-rsid="0020b5d2"/>
    </style:style>
    <style:style style:name="T1" style:family="text">
      <style:text-properties officeooo:rsid="0020b5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USINESS PLAN – INTHEROOM DAKAR</text:p>
      <text:p text:style-name="Standard"/>
      <text:p text:style-name="Standard">1. Concept</text:p>
      <text:p text:style-name="Standard">INTHEROOM est une expérience événementielle immersive et exclusive destinée aux jeunes adultes urbains de Dakar. L'objectif n'est pas d'organiser une simple soirée mais de créer une communauté autour d'expériences uniques, à capacité limitée, dans des lieux soigneusement sélectionnés.</text:p>
      <text:p text:style-name="Standard">2. Positionnement</text:p>
      <text:p text:style-name="Standard">Premium accessible</text:p>
      <text:p text:style-name="Standard">Contrairement aux clubs classiques :Places limitées, Sélection des participants,Lieux atypiques,Forte identité visuelle,Expérience communautaire</text:p>
      <text:p text:style-name="Standard">Slogan possible :"Ceux qui sont dans la room comprennent."</text:p>
      <text:p text:style-name="Standard"/>
      <text:p text:style-name="Standard">3. Cible</text:p>
      <text:p text:style-name="P1"><text:span text:style-name="T1">La p</text:span>rincipale <text:span text:style-name="T1">cible sont des étudiants, jeunes professionnels, entrepreneurs, créatifs de la tranche d’âge 18 à 35 ans, des Consommateurs de culture urbaine, des Secondaires, des <text:s/>Influenceurs,</text:span></text:p>
      <text:p text:style-name="P2">la diaspora de passage à Dakar, des touristes recherchant des expériences locales</text:p>
      <text:p text:style-name="Standard"/>
      <text:p text:style-name="Standard">4. Sources de revenus</text:p>
      <text:p text:style-name="Standard">Billetterie <text:span text:style-name="T1">en terme d’e</text:span>xemple :Prévente : 5 000 FCFA, Sur place : 10 000 FCFA</text:p>
      <text:p text:style-name="Standard">Capacité :100 personnes</text:p>
      <text:p text:style-name="Standard">Recette moyenne :100 × 5 000 = 500 000 FCFA</text:p>
      <text:p text:style-name="Standard">Espaces VIP</text:p>
      <text:p text:style-name="Standard">Exemple :Salon 85 000,Salon 125 000,Salon 250 000,Salon 300 000,Salon 500 000</text:p>
      <text:p text:style-name="Standard">Potentiel :<text:span text:style-name="T1">environ</text:span> 1 260 000 FCFA</text:p>
      <text:p text:style-name="Standard">Vente de boissons <text:span text:style-name="T1">dont la </text:span>Marge <text:span text:style-name="T1">est </text:span>souvent comprise entre 50 % et 80 %.</text:p>
      <text:p text:style-name="Standard">Objectif :500 000 à 2 000 000 FCFA selon l'événement.</text:p>
      <text:p text:style-name="Standard">Sponsoring : Marques :Boissons,Téléphonie, Mode</text:p>
      <text:p text:style-name="Standard">Lifestyle <text:span text:style-name="T1">dont l’o</text:span>bjectif : 300 000 à 2 000 000 FCFA par édition.</text:p>
      <text:p text:style-name="Standard"/>
      <text:p text:style-name="Standard">5. Dépenses</text:p>
      <text:p text:style-name="Standard">Lieu :200 000 à 1 000 000 FCFA</text:p>
      <text:p text:style-name="Standard">Sonorisation : 150 000 à 800 000 FCFA</text:p>
      <text:p text:style-name="Standard">Sécurité : 100 000 à 300 000 FCFA</text:p>
      <text:p text:style-name="Standard">Communication : 100 000 à 500 000 FCFA</text:p>
      <text:p text:style-name="Standard">Personnel : 100 000 à 400 000 FCFA</text:p>
      <text:p text:style-name="Standard">Décoration / expérience : 50 000 à 500 000 FCFA</text:p>
      <text:p text:style-name="Standard"/>
      <text:p text:style-name="Standard">6. Exemple de rentabilité</text:p>
      <text:p text:style-name="Standard">Revenus</text:p>
      <text:p text:style-name="Standard">Billetterie : 500 000 FCFA</text:p>
      <text:p text:style-name="Standard">VIP : 1 260 000 FCFA</text:p>
      <text:p text:style-name="Standard">Boissons : 1 200 000 FCFA</text:p>
      <text:p text:style-name="Standard">Sponsor : 500 000 FCFA</text:p>
      <text:p text:style-name="Standard">Total : 3 460 000 FCFA</text:p>
      <text:p text:style-name="Standard">Dépenses</text:p>
      <text:p text:style-name="Standard">Lieu : 500 000 FCFA</text:p>
      <text:p text:style-name="Standard">Son : 400 000 FCFA</text:p>
      <text:p text:style-name="Standard">Sécurité : 150 000 FCFA</text:p>
      <text:p text:style-name="Standard">Communication : 250 000 FCFA</text:p>
      <text:p text:style-name="Standard">Personnel : 200 000 FCFA</text:p>
      <text:p text:style-name="Standard">Divers : 200 000 FCFA</text:p>
      <text:p text:style-name="Standard"><text:soft-page-break/>Total : 1 700 000 FCFA</text:p>
      <text:p text:style-name="Standard">Résultat</text:p>
      <text:p text:style-name="Standard">Bénéfice estimé : 1 760 000 FCFA</text:p>
      <text:p text:style-name="Standard">7. Vision à 3 ans</text:p>
      <text:p text:style-name="Standard">Faire d'INTHEROOM une référence des événements exclusifs à Dakar.</text:p>
      <text:p text:style-name="Standard">Organiser des éditions mensuelles.</text:p>
      <text:p text:style-name="Standard">Développer une communauté privée.</text:p>
      <text:p text:style-name="Standard">Lancer des expériences dans d'autres villes d'Afrique de l'Ouest.</text:p>
      <text:p text:style-name="Standard">Créer une marque lifestyle INTHEROOM (merchandising, contenus, partenariats).</text:p>
      <text:p text:style-name="Standard">Le point fort d'INTHEROOM n'est pas la soirée elle-même, mais la rareté et le sentiment d'appartenance. C'est généralement ce qui permet aux concepts événementiels de conserver leur valeur sur le long ter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10:43:20.294545400</meta:creation-date>
    <dc:date>2026-06-07T14:32:36.271393900</dc:date>
    <meta:editing-duration>PT34M23S</meta:editing-duration>
    <meta:editing-cycles>3</meta:editing-cycles>
    <meta:generator>LibreOffice/26.2.3.2$Windows_X86_64 LibreOffice_project/70e089b17412e4cb7773e41413306b17a2328c34</meta:generator>
    <meta:document-statistic meta:table-count="0" meta:image-count="0" meta:object-count="0" meta:page-count="2" meta:paragraph-count="52" meta:word-count="407" meta:character-count="2446" meta:non-whitespace-character-count="2089"/>
  </office:meta>
</office:document-meta>
</file>